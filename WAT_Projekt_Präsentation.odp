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png" manifest:media-type="image/png"/>
  <manifest:file-entry manifest:full-path="media/image3.svg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514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514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style:font-family-asian="Aptos" style:font-family-complex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167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style:font-family-asian="Aptos" style:font-family-complex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 style:parent-style-name="Graphics">
      <style:graphic-properties draw:fill="none" draw:stroke="non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style:font-family-asian="Aptos" style:font-family-complex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style:font-family-asian="Aptos" style:font-family-complex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style:font-family-asian="Aptos" style:font-family-complex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style:font-family-asian="Aptos" style:font-family-complex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514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draw:stroke="non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style:font-family-asian="Aptos" style:font-family-complex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 style:parent-style-name="Graphics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 style:parent-style-name="Graphics">
      <style:graphic-properties draw:fill="none" draw:stroke="non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 style:parent-style-name="Graphics">
      <style:graphic-properties draw:fill="none" draw:stroke="none"/>
    </style:style>
    <style:style style:family="graphic" style:name="a404" style:parent-style-name="Graphics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style:font-family-asian="Aptos" style:font-family-complex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style:font-family-asian="Aptos" style:font-family-complex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style:font-family-asian="Aptos" style:font-family-complex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style:font-family-asian="Aptos" style:font-family-complex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4" style:parent-style-name="Graphics">
      <style:graphic-properties draw:fill="none" draw:stroke="non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Mon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514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514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 style:parent-style-name="Graphics">
      <style:graphic-properties draw:fill="none" draw:stroke="non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514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48" style:parent-style-name="Graphics">
      <style:graphic-properties draw:fill="none" fo:clip="rect(0.0031in, 1.56601in, 0.75656in, 0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6" style:parent-style-name="Graphics">
      <style:graphic-properties draw:fill="none" draw:stroke="non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514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graphic" style:name="a467" style:parent-style-name="Graphics">
      <style:graphic-properties draw:fill="none" draw:stroke="none"/>
    </style:style>
    <style:style style:family="graphic" style:name="a468" style:parent-style-name="Graphics">
      <style:graphic-properties draw:fill="none" draw:stroke="none"/>
    </style:style>
    <style:style style:family="graphic" style:name="a469" style:parent-style-name="Graphics">
      <style:graphic-properties draw:fill="none" draw:stroke="none"/>
    </style:style>
    <style:style style:family="graphic" style:name="a470" style:parent-style-name="Graphics">
      <style:graphic-properties draw:fill="none" draw:stroke="none"/>
    </style:style>
    <style:style style:family="graphic" style:name="a471" style:parent-style-name="Graphics">
      <style:graphic-properties draw:fill="none" draw:stroke="non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elfolie" presentation:presentation-page-layout-name="Master1-PPL1" draw:id="Slide-256">
        <draw:custom-shape svg:x="0in" svg:y="0in" svg:width="13.33333in" svg:height="7.5in" draw:id="id63" draw:style-name="a362" draw:name="Rectangle 14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66" draw:name="Titel 1" svg:x="0.7in" svg:y="0.35in" svg:width="7.31936in" svg:height="4.25707in" presentation:class="title" presentation:placeholder="false">
          <draw:text-box>
            <text:p text:style-name="a365" text:class-names="" text:cond-style-name=""><text:span text:style-name="a363" text:class-names="">opencloud-eu</text:span><text:span text:style-name="a364" text:class-names="">/web</text:span></text:p>
          </draw:text-box>
          <svg:title/>
          <svg:desc/>
        </draw:frame>
        <draw:frame draw:id="id65" presentation:style-name="a369" draw:name="Untertitel 2" svg:x="0.7in" svg:y="5.0647in" svg:width="7.31936in" svg:height="1.71641in" presentation:class="subtitle" presentation:placeholder="false">
          <draw:text-box>
            <text:p text:style-name="a368" text:class-names="" text:cond-style-name=""><text:span text:style-name="a367" text:class-names="">von Christoph Thiel und Michel Tischler</text:span></text:p>
          </draw:text-box>
          <svg:title/>
          <svg:desc/>
        </draw:frame>
        <draw:custom-shape svg:x="0.78145in" svg:y="4.82203in" svg:width="4.64085in" svg:height="0.02in" draw:id="id66" draw:style-name="a372" draw:name="sketch line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373" draw:name="Graphic 5" svg:x="8.51in" svg:y="1.38569in" svg:width="4.47in" svg:height="4.47in" style:rel-width="scale" style:rel-height="scale">
          <draw:image xlink:href="media/image1.svg" xlink:type="simple" xlink:show="embed" xlink:actuate="onLoad"/>
          <svg:title/>
          <svg:desc>logo.svg</svg:desc>
        </draw:frame>
      </draw:page>
      <draw:page draw:name="Slide2" draw:style-name="a374" draw:master-page-name="Master1-Layout2-obj-Titel-und-Inhalt" presentation:presentation-page-layout-name="Master1-PPL2" draw:id="Slide-257">
        <draw:custom-shape svg:x="0in" svg:y="0in" svg:width="13.33in" svg:height="7.5in" draw:id="id68" draw:style-name="a377" draw:name="Rectangle 10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380" draw:name="Title 1" svg:x="0.91667in" svg:y="0.39931in" svg:width="11.5in" svg:height="1.44965in" presentation:class="title" presentation:placeholder="false">
          <draw:text-box>
            <text:p text:style-name="a379" text:class-names="" text:cond-style-name=""><text:span text:style-name="a378" text:class-names="">Was ist OpenCloud?</text:span></text:p>
          </draw:text-box>
          <svg:title/>
          <svg:desc/>
        </draw:frame>
        <draw:custom-shape svg:x="0.73167in" svg:y="1.8344in" svg:width="11.87in" svg:height="0.02in" draw:id="id70" draw:style-name="a383" draw:name="sketch line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399" draw:name="Content Placeholder 5" svg:x="0.91667in" svg:y="2.11in" svg:width="11.5in" svg:height="4.65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4" text:class-names="">Alternative zu Google Drive, OneDrive, usw.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Quelloffen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Selbst bereitstellbar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Fork von OwnCloud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</draw:text-box>
          <svg:title/>
          <svg:desc/>
        </draw:frame>
        <draw:frame draw:id="id72" draw:style-name="a400" draw:name="Picture 6" svg:x="0.73244in" svg:y="4.91745in" svg:width="1.837in" svg:height="1.837in" style:rel-width="scale" style:rel-height="scale">
          <draw:image xlink:href="media/image2.png" xlink:type="simple" xlink:show="embed" xlink:actuate="onLoad"/>
          <svg:title/>
          <svg:desc>VueJS | Tools &amp; Frameworks | Technologie | JOSHMARTIN</svg:desc>
        </draw:frame>
        <draw:frame draw:id="id73" draw:style-name="a401" draw:name="Graphic 8" svg:x="2.56692in" svg:y="6.37104in" svg:width="2.25085in" svg:height="0.27155in" style:rel-width="scale" style:rel-height="scale">
          <draw:image xlink:href="media/image3.svg" xlink:type="simple" xlink:show="embed" xlink:actuate="onLoad"/>
          <svg:title/>
          <svg:desc>Vitest logo</svg:desc>
        </draw:frame>
        <draw:frame draw:id="id74" draw:style-name="a402" draw:name="Picture 9" svg:x="5.24004in" svg:y="4.20493in" svg:width="3in" svg:height="3in" style:rel-width="scale" style:rel-height="scale">
          <draw:image xlink:href="media/image4.png" xlink:type="simple" xlink:show="embed" xlink:actuate="onLoad"/>
          <svg:title/>
          <svg:desc>playwright gravatar</svg:desc>
        </draw:frame>
        <draw:frame draw:id="id75" draw:style-name="a403" draw:name="Picture 13" svg:x="8.40831in" svg:y="4.91093in" svg:width="1.38044in" svg:height="1.59323in" style:rel-width="scale" style:rel-height="scale">
          <draw:image xlink:href="media/image5.png" xlink:type="simple" xlink:show="embed" xlink:actuate="onLoad"/>
          <svg:title/>
          <svg:desc>Cucumber</svg:desc>
        </draw:frame>
        <draw:frame draw:id="id76" draw:style-name="a404" draw:name="Picture 16" svg:x="10.27254in" svg:y="5.57692in" svg:width="2.32705in" svg:height="0.52855in" style:rel-width="scale" style:rel-height="scale">
          <draw:image xlink:href="media/image6.png" xlink:type="simple" xlink:show="embed" xlink:actuate="onLoad"/>
          <svg:title/>
          <svg:desc>Datei:Docker Logo.png – Wikipedia</svg:desc>
        </draw:frame>
        <draw:frame draw:id="id77" draw:style-name="a413" draw:transform="translate(-1.79245in -0.52171in) rotate(0.17453) translate(11.28931in 3.3781in)" draw:name="TextBox 18" svg:width="3.5849in" svg:height="1.04342in">
          <draw:text-box>
            <text:p text:style-name="a408" text:class-names="" text:cond-style-name=""><text:span text:style-name="a405" text:class-names="">Google Drive für<text:s text:c="1"/></text:span><text:span text:style-name="a406" text:class-names="">Arme</text:span><text:span text:style-name="a407" text:class-names=""/></text:p>
            <text:p text:style-name="a410" text:class-names="" text:cond-style-name=""><text:span text:style-name="a409" text:class-names="">Google Drive für Kluge</text:span></text:p>
            <text:p text:style-name="a412" text:class-names="" text:cond-style-name=""><text:span text:style-name="a411" text:class-names=""> </text:span></text:p>
          </draw:text-box>
          <svg:title/>
          <svg:desc/>
        </draw:frame>
        <draw:frame draw:id="id78" draw:style-name="a414" draw:name="Picture 20" svg:x="3.33464in" svg:y="4.90959in" svg:width="1.13994in" svg:height="1.13994in" style:rel-width="scale" style:rel-height="scale">
          <draw:image xlink:href="media/image7.png" xlink:type="simple" xlink:show="embed" xlink:actuate="onLoad"/>
          <svg:title/>
          <svg:desc>@istanbuljs</svg:desc>
        </draw:frame>
      </draw:page>
      <draw:page draw:name="Slide9" draw:style-name="a415" draw:master-page-name="Master1-Layout2-obj-Titel-und-Inhalt" presentation:presentation-page-layout-name="Master1-PPL2" draw:id="Slide-264">
        <draw:custom-shape svg:x="0in" svg:y="0in" svg:width="13.33in" svg:height="7.5in" draw:id="id79" draw:style-name="a418" draw:name="Rectangle 10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presentation:style-name="a422" draw:name="Title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19" text:class-names="">Unit Tests</text:span><text:span text:style-name="a420" text:class-names=""/></text:p>
          </draw:text-box>
          <svg:title/>
          <svg:desc/>
        </draw:frame>
        <draw:custom-shape svg:x="0.73167in" svg:y="1.8344in" svg:width="11.87in" svg:height="0.02in" draw:id="id81" draw:style-name="a425" draw:name="sketch line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446" draw:name="Content Placeholder 5" svg:x="0.91667in" svg:y="2.11in" svg:width="11.5in" svg:height="4.65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6" text:class-names="">Bereits integriert:<text:s text:c="1"/></text:span><text:span text:style-name="a427" text:class-names="">Vitest</text:span><text:span text:style-name="a428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1" text:class-names="">Arrange</text:span><text:span text:style-name="a432" text:class-names="">, Act,<text:s text:c="1"/></text:span><text:span text:style-name="a433" text:class-names="">Assert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Tests für Kern-Komponenten</text:span></text:p>
              </text:list-item>
            </text:list>
            <text:list text:style-name="a442">
              <text:list-item>
                <text:p text:style-name="a441" text:class-names="" text:cond-style-name=""><text:span text:style-name="a439" text:class-names="">Mocking</text:span><text:span text:style-name="a440" text:class-names=""><text:s text:c="1"/>für Abhängigkeiten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</draw:text-box>
          <svg:title/>
          <svg:desc/>
        </draw:frame>
        <draw:frame draw:id="id83" draw:style-name="a447" draw:name="Grafik 3" svg:x="1.65476in" svg:y="4.87822in" svg:width="8.11111in" svg:height="2.46577in" style:rel-width="scale" style:rel-height="scale">
          <draw:image xlink:href="media/image8.png" xlink:type="simple" xlink:show="embed" xlink:actuate="onLoad"/>
          <svg:title/>
          <svg:desc>Ein Bild, das Text, Screenshot, Schrift, Display enthält.

KI-generierte Inhalte können fehlerhaft sein.</svg:desc>
        </draw:frame>
        <draw:frame draw:id="id84" draw:style-name="a448" draw:name="Grafik 4" svg:x="5.71428in" svg:y="2.10732in" svg:width="6.26191in" svg:height="2.72727in" style:rel-width="scale" style:rel-height="scale">
          <draw:image xlink:href="media/image9.png" xlink:type="simple" xlink:show="embed" xlink:actuate="onLoad"/>
          <svg:title/>
          <svg:desc>Ein Bild, das Text, Screenshot, Display, Software enthält.

KI-generierte Inhalte können fehlerhaft sein.</svg:desc>
        </draw:frame>
      </draw:page>
      <draw:page draw:name="Slide3" draw:style-name="a449" draw:master-page-name="Master1-Layout2-obj-Titel-und-Inhalt" presentation:presentation-page-layout-name="Master1-PPL2" draw:id="Slide-258">
        <draw:custom-shape svg:x="0in" svg:y="0in" svg:width="13.33in" svg:height="7.5in" draw:id="id85" draw:style-name="a452" draw:name="Rectangle 10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455" draw:name="Title 1" svg:x="0.91667in" svg:y="0.39931in" svg:width="11.5in" svg:height="1.44965in" presentation:class="title" presentation:placeholder="false">
          <draw:text-box>
            <text:p text:style-name="a454" text:class-names="" text:cond-style-name=""><text:span text:style-name="a453" text:class-names="">Test Coverage</text:span></text:p>
          </draw:text-box>
          <svg:title/>
          <svg:desc/>
        </draw:frame>
        <draw:custom-shape svg:x="0.73167in" svg:y="1.8344in" svg:width="11.87in" svg:height="0.02in" draw:id="id87" draw:style-name="a458" draw:name="sketch line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65" draw:name="Content Placeholder 5" svg:x="0.91667in" svg:y="2.11in" svg:width="11.5in" svg:height="4.65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  <draw:frame draw:id="id89" draw:style-name="a466" draw:name="Picture 2" svg:x="1.12421in" svg:y="2.11059in" svg:width="10.83333in" svg:height="0.33333in" style:rel-width="scale" style:rel-height="scale">
          <draw:image xlink:href="media/image10.png" xlink:type="simple" xlink:show="embed" xlink:actuate="onLoad"/>
          <svg:title/>
          <svg:desc/>
        </draw:frame>
        <draw:frame draw:id="id90" draw:style-name="a467" draw:name="Picture 3" svg:x="1.12464in" svg:y="2.51174in" svg:width="10.83333in" svg:height="0.33333in" style:rel-width="scale" style:rel-height="scale">
          <draw:image xlink:href="media/image11.png" xlink:type="simple" xlink:show="embed" xlink:actuate="onLoad"/>
          <svg:title/>
          <svg:desc/>
        </draw:frame>
        <draw:frame draw:id="id91" draw:style-name="a468" draw:name="Picture 4" svg:x="1.05058in" svg:y="3.23913in" svg:width="10.98361in" svg:height="0.28052in" style:rel-width="scale" style:rel-height="scale">
          <draw:image xlink:href="media/image12.png" xlink:type="simple" xlink:show="embed" xlink:actuate="onLoad"/>
          <svg:title/>
          <svg:desc/>
        </draw:frame>
        <draw:frame draw:id="id92" draw:style-name="a469" draw:name="Picture 7" svg:x="0.81533in" svg:y="3.59247in" svg:width="11.84205in" svg:height="0.31669in" style:rel-width="scale" style:rel-height="scale">
          <draw:image xlink:href="media/image13.png" xlink:type="simple" xlink:show="embed" xlink:actuate="onLoad"/>
          <svg:title/>
          <svg:desc/>
        </draw:frame>
        <draw:frame draw:id="id93" draw:style-name="a470" draw:name="Picture 6" svg:x="0.9194in" svg:y="4.19345in" svg:width="11.6374in" svg:height="0.47817in" style:rel-width="scale" style:rel-height="scale">
          <draw:image xlink:href="media/image14.png" xlink:type="simple" xlink:show="embed" xlink:actuate="onLoad"/>
          <svg:title/>
          <svg:desc/>
        </draw:frame>
        <draw:frame draw:id="id94" draw:style-name="a471" draw:name="Picture 8" svg:x="0.73685in" svg:y="4.82837in" svg:width="12.00248in" svg:height="0.49405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0" draw:style-name="a472" draw:master-page-name="Master1-Layout2-obj-Titel-und-Inhalt" presentation:presentation-page-layout-name="Master1-PPL2" draw:id="Slide-265">
        <draw:custom-shape svg:x="0in" svg:y="0in" svg:width="13.33in" svg:height="7.5in" draw:id="id95" draw:style-name="a475" draw:name="Rectangle 10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presentation:style-name="a478" draw:name="Title 1" svg:x="0.91667in" svg:y="0.39931in" svg:width="11.5in" svg:height="1.44965in" presentation:class="title" presentation:placeholder="false">
          <draw:text-box>
            <text:p text:style-name="a477" text:class-names="" text:cond-style-name=""><text:span text:style-name="a476" text:class-names="">Integration Tests</text:span></text:p>
          </draw:text-box>
          <svg:title/>
          <svg:desc/>
        </draw:frame>
        <draw:custom-shape svg:x="0.73167in" svg:y="1.8344in" svg:width="11.87in" svg:height="0.02in" draw:id="id97" draw:style-name="a481" draw:name="sketch line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501" draw:name="Content Placeholder 5" svg:x="0.91667in" svg:y="2.11in" svg:width="11.5in" svg:height="4.65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2" text:class-names="">Eigene</text:span><text:span text:style-name="a483" text:class-names=""><text:s text:c="1"/></text:span><text:span text:style-name="a484" text:class-names="">„Infrastruktur“ -&gt; Folder + Docker</text:span></text:p>
              </text:list-item>
            </text:list>
            <text:list text:style-name="a490">
              <text:list-item>
                <text:p text:style-name="a489" text:class-names="" text:cond-style-name=""><text:span text:style-name="a487" text:class-names="">Z</text:span><text:span text:style-name="a488" text:class-names="">wischen Anwendung und WebDAV-Server</text:span></text:p>
              </text:list-item>
            </text:list>
            <text:list text:style-name="a497">
              <text:list-item>
                <text:p text:style-name="a496" text:class-names="" text:cond-style-name=""><text:span text:style-name="a491" text:class-names="">Zwi</text:span><text:span text:style-name="a492" text:class-names="">schen Anwendung und<text:s text:c="1"/></text:span><text:span text:style-name="a493" text:class-names="">OpenCloud</text:span><text:span text:style-name="a494" text:class-names="">-Backend</text:span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</draw:page>
      <draw:page draw:name="Slide7" draw:style-name="a502" draw:master-page-name="Master1-Layout2-obj-Titel-und-Inhalt" presentation:presentation-page-layout-name="Master1-PPL2" draw:id="Slide-262">
        <draw:custom-shape svg:x="0in" svg:y="0in" svg:width="13.33in" svg:height="7.5in" draw:id="id99" draw:style-name="a505" draw:name="Rectangle 10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509" draw:name="Title 1" svg:x="0.91667in" svg:y="0.39931in" svg:width="11.5in" svg:height="1.44965in" presentation:class="title" presentation:placeholder="false">
          <draw:text-box>
            <text:p text:style-name="a508" text:class-names="" text:cond-style-name=""><text:span text:style-name="a506" text:class-names="">E2E Tests</text:span><text:span text:style-name="a507" text:class-names=""/></text:p>
          </draw:text-box>
          <svg:title/>
          <svg:desc/>
        </draw:frame>
        <draw:custom-shape svg:x="0.73167in" svg:y="1.8344in" svg:width="11.87in" svg:height="0.02in" draw:id="id101" draw:style-name="a512" draw:name="sketch line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presentation:style-name="a528" draw:name="Content Placeholder 5" svg:x="0.91667in" svg:y="2.11in" svg:width="11.5in" svg:height="4.65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3" text:class-names="">Kombination aus<text:s text:c="1"/></text:span><text:span text:style-name="a514" text:class-names="">Cucumber</text:span><text:span text:style-name="a515" text:class-names=""><text:s text:c="1"/>und<text:s text:c="1"/></text:span><text:span text:style-name="a516" text:class-names="">Playwright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Triviale Fälle oft nicht abgebildet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  <draw:frame draw:id="id103" draw:style-name="a566" draw:name="TextBox 2" svg:x="2.59958in" svg:y="3.39428in" svg:width="8.13417in" svg:height="2.72637in">
          <draw:text-box>
            <text:p text:style-name="a531" text:class-names="" text:cond-style-name=""><text:span text:style-name="a529" text:class-names="">  Scenario: download single resource</text:span><text:span text:style-name="a530" text:class-names=""/></text:p>
            <text:p text:style-name="a534" text:class-names="" text:cond-style-name=""><text:span text:style-name="a532" text:class-names="">    And "Christoph" creates the following files into personal space using API</text:span><text:span text:style-name="a533" text:class-names=""/></text:p>
            <text:p text:style-name="a539" text:class-names="" text:cond-style-name=""><text:span text:style-name="a535" text:class-names="">      |<text:s text:c="1"/></text:span><text:span text:style-name="a536" text:class-names="">pathToFile</text:span><text:span text:style-name="a537" text:class-names="">                      | content     |</text:span><text:span text:style-name="a538" text:class-names=""/></text:p>
            <text:p text:style-name="a542" text:class-names="" text:cond-style-name=""><text:span text:style-name="a540" text:class-names="">      | file.txt                        | lorem ipsum |</text:span><text:span text:style-name="a541" text:class-names=""/></text:p>
            <text:p text:style-name="a544" text:class-names="" text:cond-style-name=""><text:span text:style-name="a543" text:class-names=""/></text:p>
            <text:p text:style-name="a546" text:class-names="" text:cond-style-name=""><text:span text:style-name="a545" text:class-names=""/></text:p>
            <text:p text:style-name="a549" text:class-names="" text:cond-style-name=""><text:span text:style-name="a547" text:class-names="">    When "Christoph" logs in</text:span><text:span text:style-name="a548" text:class-names=""/></text:p>
            <text:p text:style-name="a552" text:class-names="" text:cond-style-name=""><text:span text:style-name="a550" text:class-names="">    And "Christoph" downloads the following resource using the context menu</text:span><text:span text:style-name="a551" text:class-names=""/></text:p>
            <text:p text:style-name="a555" text:class-names="" text:cond-style-name=""><text:span text:style-name="a553" text:class-names="">      | resource       | type   |</text:span><text:span text:style-name="a554" text:class-names=""/></text:p>
            <text:p text:style-name="a558" text:class-names="" text:cond-style-name=""><text:span text:style-name="a556" text:class-names="">      | file.txt       | file   |</text:span><text:span text:style-name="a557" text:class-names=""/></text:p>
            <text:p text:style-name="a561" text:class-names="" text:cond-style-name=""><text:span text:style-name="a559" text:class-names="">    And "Christoph" logs out</text:span><text:span text:style-name="a560" text:class-names=""/></text:p>
            <text:p text:style-name="a563" text:class-names="" text:cond-style-name=""><text:span text:style-name="a562" text:class-names="">...</text:span></text:p>
            <text:p text:style-name="a565" text:class-names="" text:cond-style-name=""><text:span text:style-name="a564" text:class-names=""/></text:p>
          </draw:text-box>
          <svg:title/>
          <svg:desc/>
        </draw:frame>
      </draw:page>
      <draw:page draw:name="Slide4" draw:style-name="a567" draw:master-page-name="Master1-Layout2-obj-Titel-und-Inhalt" presentation:presentation-page-layout-name="Master1-PPL2" draw:id="Slide-259">
        <draw:custom-shape svg:x="0in" svg:y="0in" svg:width="13.33in" svg:height="7.5in" draw:id="id104" draw:style-name="a570" draw:name="Rectangle 10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573" draw:name="Title 1" svg:x="0.91667in" svg:y="0.39931in" svg:width="11.5in" svg:height="1.44965in" presentation:class="title" presentation:placeholder="false">
          <draw:text-box>
            <text:p text:style-name="a572" text:class-names="" text:cond-style-name=""><text:span text:style-name="a571" text:class-names="">Load Tests​</text:span></text:p>
          </draw:text-box>
          <svg:title/>
          <svg:desc/>
        </draw:frame>
        <draw:custom-shape svg:x="0.73167in" svg:y="1.8344in" svg:width="11.87in" svg:height="0.02in" draw:id="id106" draw:style-name="a576" draw:name="sketch line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595" draw:name="Content Placeholder 5" svg:x="0.91667in" svg:y="2.11in" svg:width="11.5in" svg:height="4.65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77" text:class-names="">k6 gemeinsam mit<text:s text:c="1"/></text:span><text:span text:style-name="a578" text:class-names="">Grafana</text:span><text:span text:style-name="a579" text:class-names=""><text:s text:c="1"/>(Dashboard</text:span><text:span text:style-name="a580" text:class-names="">)</text:span><text:span text:style-name="a581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4" text:class-names="">Thresholds</text:span><text:span text:style-name="a585" text:class-names=""><text:s text:c="1"/>-&gt; Pass/Fail-Test</text:span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  <draw:frame draw:id="id108" draw:style-name="a596" draw:name="Grafik 3" svg:x="0.91667in" svg:y="3.02028in" svg:width="8.22619in" svg:height="4.37016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8" draw:style-name="a597" draw:master-page-name="Master1-Layout2-obj-Titel-und-Inhalt" presentation:presentation-page-layout-name="Master1-PPL2" draw:id="Slide-263">
        <draw:custom-shape svg:x="0in" svg:y="0in" svg:width="13.33in" svg:height="7.5in" draw:id="id109" draw:style-name="a600" draw:name="Rectangle 10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604" draw:name="Title 1" svg:x="0.91667in" svg:y="0.39931in" svg:width="11.5in" svg:height="1.44965in" presentation:class="title" presentation:placeholder="false">
          <draw:text-box>
            <text:p text:style-name="a603" text:class-names="" text:cond-style-name=""><text:span text:style-name="a601" text:class-names="">Pipeline</text:span><text:span text:style-name="a602" text:class-names=""/></text:p>
          </draw:text-box>
          <svg:title/>
          <svg:desc/>
        </draw:frame>
        <draw:custom-shape svg:x="0.73167in" svg:y="1.8344in" svg:width="11.87in" svg:height="0.02in" draw:id="id111" draw:style-name="a607" draw:name="sketch line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presentation:style-name="a623" draw:name="Content Placeholder 5" svg:x="0.91667in" svg:y="2.11in" svg:width="11.5in" svg:height="4.65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GitHub Actions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Selbstbereitgestellter Runner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Linux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Jede Testart in eigenem Job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4.06.2026</text:date></text:span><text:span text:style-name="a22" text:class-names=""/></text:p>
        </draw:text-box>
        <svg:title/>
        <svg:desc/>
      </draw:frame>
      <draw:frame draw:id="id3" presentation:style-name="a27" draw:name="Fußzeilenplatzhalt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5" draw:name="Titel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Titelmasterformat durch Klicken bearbeiten</text:span></text:p>
        </draw:text-box>
        <svg:title/>
        <svg:desc/>
      </draw:frame>
      <draw:frame draw:id="id6" presentation:style-name="a38" draw:name="Untertitel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Formatvorlage des Untertitelmasters durch Klicken bearbeiten</text:span></text:p>
        </draw:text-box>
        <svg:title/>
        <svg:desc/>
      </draw:frame>
      <draw:frame draw:id="id7" presentation:style-name="a43" draw:name="Datumsplatzhalt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4.06.2026</text:date></text:span><text:span text:style-name="a41" text:class-names=""/></text:p>
        </draw:text-box>
        <svg:title/>
        <svg:desc/>
      </draw:frame>
      <draw:frame draw:id="id8" presentation:style-name="a46" draw:name="Fußzeilenplatzhalt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4" draw:name="Titel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Titelmasterformat durch Klicken bearbeiten</text:span></text:p>
        </draw:text-box>
        <svg:title/>
        <svg:desc/>
      </draw:frame>
      <draw:frame draw:id="id11" presentation:style-name="a70" draw:name="Inhaltsplatzhalt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Textmasterformat bearbeiten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Zweite Ebene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umsplatzhalt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4.06.2026</text:date></text:span><text:span text:style-name="a73" text:class-names=""/></text:p>
        </draw:text-box>
        <svg:title/>
        <svg:desc/>
      </draw:frame>
      <draw:frame draw:id="id13" presentation:style-name="a78" draw:name="Fußzeilenplatzhalt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3">
      <draw:frame draw:id="id15" presentation:style-name="a86" draw:name="Titel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Titelmasterformat durch Klicken bearbeiten</text:span></text:p>
        </draw:text-box>
        <svg:title/>
        <svg:desc/>
      </draw:frame>
      <draw:frame draw:id="id16" presentation:style-name="a90" draw:name="Textplatzhalt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Textmaster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4.06.2026</text:date></text:span><text:span text:style-name="a93" text:class-names=""/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Foliennummernplatzhalt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Zwei-Inhalte" style:page-layout-name="pageLayout1" draw:style-name="a103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Titelmasterformat durch Klicken bearbeiten</text:span></text:p>
        </draw:text-box>
        <svg:title/>
        <svg:desc/>
      </draw:frame>
      <draw:frame draw:id="id21" presentation:style-name="a122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Textmaster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Inhaltsplatzhalt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Textmaster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umsplatzhalt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4.06.2026</text:date></text:span><text:span text:style-name="a141" text:class-names=""/></text:p>
        </draw:text-box>
        <svg:title/>
        <svg:desc/>
      </draw:frame>
      <draw:frame draw:id="id24" presentation:style-name="a146" draw:name="Fußzeilenplatzhalt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4" draw:name="Titel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Titelmasterformat durch Klicken bearbeiten</text:span></text:p>
        </draw:text-box>
        <svg:title/>
        <svg:desc/>
      </draw:frame>
      <draw:frame draw:id="id27" presentation:style-name="a158" draw:name="Textplatzhalt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Textmasterformat bearbeiten</text:span></text:p>
            </text:list-item>
          </text:list>
        </draw:text-box>
        <svg:title/>
        <svg:desc/>
      </draw:frame>
      <draw:frame draw:id="id28" presentation:style-name="a174" draw:name="Inhaltsplatzhalt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Textmasterformat bearbeite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Zweite Ebene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platzhalt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Textmasterformat bearbeiten</text:span></text:p>
            </text:list-item>
          </text:list>
        </draw:text-box>
        <svg:title/>
        <svg:desc/>
      </draw:frame>
      <draw:frame draw:id="id30" presentation:style-name="a194" draw:name="Inhaltsplatzhalt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Textmasterformat bearbeiten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Zweite Ebene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umsplatzhalt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4.06.2026</text:date></text:span><text:span text:style-name="a197" text:class-names=""/></text:p>
        </draw:text-box>
        <svg:title/>
        <svg:desc/>
      </draw:frame>
      <draw:frame draw:id="id32" presentation:style-name="a202" draw:name="Fußzeilenplatzhalt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Foliennummernplatzhalt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Nur-Titel" style:page-layout-name="pageLayout1" draw:style-name="a207">
      <draw:frame draw:id="id34" presentation:style-name="a210" draw:name="Titel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Titelmasterformat durch Klicken bearbeiten</text:span></text:p>
        </draw:text-box>
        <svg:title/>
        <svg:desc/>
      </draw:frame>
      <draw:frame draw:id="id35" presentation:style-name="a215" draw:name="Datumsplatzhalt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4.06.2026</text:date></text:span><text:span text:style-name="a213" text:class-names=""/></text:p>
        </draw:text-box>
        <svg:title/>
        <svg:desc/>
      </draw:frame>
      <draw:frame draw:id="id36" presentation:style-name="a218" draw:name="Fußzeilenplatzhalt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8" draw:name="Datumsplatzhalt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4.06.2026</text:date></text:span><text:span text:style-name="a226" text:class-names=""/></text:p>
        </draw:text-box>
        <svg:title/>
        <svg:desc/>
      </draw:frame>
      <draw:frame draw:id="id39" presentation:style-name="a231" draw:name="Fußzeilenplatzhalt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Foliennummernplatzhalt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36">
      <draw:frame draw:id="id41" presentation:style-name="a239" draw:name="Titel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Titelmasterformat durch Klicken bearbeiten</text:span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Textmasterformat bearbeiten</text:span></text:p>
            </text:list-item>
          </text:list>
        </draw:text-box>
        <svg:title/>
        <svg:desc/>
      </draw:frame>
      <draw:frame draw:id="id44" presentation:style-name="a264" draw:name="Datumsplatzhalt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4.06.2026</text:date></text:span><text:span text:style-name="a262" text:class-names=""/></text:p>
        </draw:text-box>
        <svg:title/>
        <svg:desc/>
      </draw:frame>
      <draw:frame draw:id="id45" presentation:style-name="a267" draw:name="Fußzeilenplatzhalt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Foliennummernplatzhalt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72">
      <draw:frame draw:id="id47" presentation:style-name="a275" draw:name="Titel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Titelmasterformat durch Klicken bearbeiten</text:span></text:p>
        </draw:text-box>
        <svg:title/>
        <svg:desc/>
      </draw:frame>
      <draw:frame draw:id="id48" presentation:style-name="a278" draw:name="Bildplatzhalt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platzhalt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 bearbeiten</text:span></text:p>
            </text:list-item>
          </text:list>
        </draw:text-box>
        <svg:title/>
        <svg:desc/>
      </draw:frame>
      <draw:frame draw:id="id50" presentation:style-name="a287" draw:name="Datumsplatzhalt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4.06.2026</text:date></text:span><text:span text:style-name="a285" text:class-names=""/></text:p>
        </draw:text-box>
        <svg:title/>
        <svg:desc/>
      </draw:frame>
      <draw:frame draw:id="id51" presentation:style-name="a290" draw:name="Fußzeilenplatzhalt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Foliennummernplatzhalt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295">
      <draw:frame draw:id="id53" presentation:style-name="a298" draw:name="Titel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Titelmasterformat durch Klicken bearbeiten</text:span></text:p>
        </draw:text-box>
        <svg:title/>
        <svg:desc/>
      </draw:frame>
      <draw:frame draw:id="id54" presentation:style-name="a314" draw:name="Vertikaler Textplatzhalt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Textmaster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umsplatzhalt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4.06.2026</text:date></text:span><text:span text:style-name="a317" text:class-names=""/></text:p>
        </draw:text-box>
        <svg:title/>
        <svg:desc/>
      </draw:frame>
      <draw:frame draw:id="id56" presentation:style-name="a322" draw:name="Fußzeilenplatzhalt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Foliennummernplatzhalt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27">
      <draw:frame draw:id="id58" presentation:style-name="a330" draw:name="Vertikaler Tite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Titelmasterformat durch Klicken bearbeiten</text:span></text:p>
        </draw:text-box>
        <svg:title/>
        <svg:desc/>
      </draw:frame>
      <draw:frame draw:id="id59" presentation:style-name="a346" draw:name="Vertikaler Textplatzhalt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Textmasterformat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umsplatzhalt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4.06.2026</text:date></text:span><text:span text:style-name="a349" text:class-names=""/></text:p>
        </draw:text-box>
        <svg:title/>
        <svg:desc/>
      </draw:frame>
      <draw:frame draw:id="id61" presentation:style-name="a354" draw:name="Fußzeilenplatzhalt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Foliennummernplatzhalt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ichel Tischler</meta:initial-creator>
    <dc:creator>Tischler Michel - s2510307091</dc:creator>
    <meta:creation-date>2026-06-24T16:33:49Z</meta:creation-date>
    <dc:date>2026-06-24T20:53:43Z</dc:date>
    <meta:editing-cycles>1</meta:editing-cycles>
    <meta:editing-duration>PT0S</meta:editing-duration>
    <meta:document-statistic meta:paragraph-count="43" meta:word-count="189"/>
  </office:meta>
</office:document-meta>
</file>